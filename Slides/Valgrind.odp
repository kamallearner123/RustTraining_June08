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001000003A7000002273209F380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fo:min-height="1.21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draw:fill="none" fo:min-height="3.21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7.112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fo:min-height="1.91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textarea-horizontal-align="center" fo:min-height="1.912cm" loext:decorative="false"/>
      <style:paragraph-properties style:writing-mode="lr-tb"/>
    </style:style>
    <style:style style:name="co1" style:family="table-column">
      <style:table-column-properties style:column-width="2.874cm" style:use-optimal-column-width="false"/>
    </style:style>
    <style:style style:name="co2" style:family="table-column">
      <style:table-column-properties style:column-width="9.673cm" style:use-optimal-column-width="false"/>
    </style:style>
    <style:style style:name="co3" style:family="table-column">
      <style:table-column-properties style:column-width="11.583cm" style:use-optimal-column-width="false"/>
    </style:style>
    <style:style style:name="co4" style:family="table-column">
      <style:table-column-properties style:column-width="10.692cm" style:use-optimal-column-width="false"/>
    </style:style>
    <style:style style:name="co5" style:family="table-column">
      <style:table-column-properties style:column-width="12.803cm" style:use-optimal-column-width="false"/>
    </style:style>
    <style:style style:name="co6" style:family="table-column">
      <style:table-column-properties style:column-width="12.137cm" style:use-optimal-column-width="false"/>
    </style:style>
    <style:style style:name="co7" style:family="table-column">
      <style:table-column-properties style:column-width="14.533cm" style:use-optimal-column-width="false"/>
    </style:style>
    <style:style style:name="co8" style:family="table-column">
      <style:table-column-properties style:column-width="10.653cm" style:use-optimal-column-width="false"/>
    </style:style>
    <style:style style:name="co9" style:family="table-column">
      <style:table-column-properties style:column-width="12.756cm" style:use-optimal-column-width="false"/>
    </style:style>
    <style:style style:name="ro1" style:family="table-row">
      <style:table-row-properties style:row-height="0.911cm" style:use-optimal-row-height="false"/>
    </style:style>
    <style:style style:name="ro2" style:family="table-row">
      <style:table-row-properties style:row-height="1.618cm" style:use-optimal-row-height="false"/>
    </style:style>
    <style:style style:name="ro3" style:family="table-row">
      <style:table-row-properties style:row-height="1.611cm" style:use-optimal-row-height="false"/>
    </style:style>
    <style:style style:name="ro4" style:family="table-row">
      <style:table-row-properties style:row-height="0.904cm" style:use-optimal-row-height="false"/>
    </style:style>
    <style:style style:name="ro5" style:family="table-row">
      <style:table-row-properties style:row-height="0.962cm" style:use-optimal-row-height="false"/>
    </style:style>
    <style:style style:name="ro6" style:family="table-row">
      <style:table-row-properties style:row-height="0cm" style:use-optimal-row-height="true"/>
    </style:style>
    <style:style style:name="ce1" style:family="table-cell">
      <style:paragraph-properties fo:text-align="center" style:text-autospace="none"/>
      <style:text-properties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ce2" style:family="table-cell">
      <style:paragraph-properties fo:text-align="right" style:text-autospace="none"/>
      <style:text-properties style:font-name="Liberation Serif" fo:font-size="16pt" style:font-name-asian="Liberation Serif" style:font-size-asian="16pt" style:font-name-complex="Liberation Serif" style:font-size-complex="16pt"/>
    </style:style>
    <style:style style:name="ce3" style:family="table-cell">
      <style:paragraph-properties style:text-autospace="none"/>
      <style:text-properties style:font-name="Liberation Serif" fo:font-size="16pt" style:font-name-asian="Liberation Serif" style:font-size-asian="16pt" style:font-name-complex="Liberation Serif" style:font-size-complex="16pt"/>
    </style:style>
    <style:style style:name="ce4" style:family="table-cell">
      <style:paragraph-properties fo:text-align="center" style:text-autospace="none"/>
      <style:text-properties fo:color="#3465a4" loext:opacity="100%" style:font-name="Liberation Serif" fo:font-weight="bold" style:font-name-asian="Liberation Serif" style:font-weight-asian="bold" style:font-name-complex="Liberation Serif" style:font-weight-complex="bold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3" style:family="paragraph">
      <style:paragraph-properties fo:margin-top="0.42cm" fo:margin-bottom="0.35cm" fo:text-align="left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 fo:text-align="left"/>
      <style:text-properties fo:font-size="10pt" style:font-size-asian="10pt" style:font-size-complex="1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/>
      <style:text-properties fo:font-size="18pt" style:font-size-asian="18pt" style:font-size-complex="1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text-align="center" style:text-autospace="none"/>
      <style:text-properties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P11" style:family="paragraph">
      <style:paragraph-properties fo:text-align="right" style:text-autospace="none"/>
      <style:text-properties style:font-name="Liberation Serif" fo:font-size="16pt" style:font-name-asian="Liberation Serif" style:font-size-asian="16pt" style:font-name-complex="Liberation Serif" style:font-size-complex="16pt"/>
    </style:style>
    <style:style style:name="P12" style:family="paragraph">
      <style:paragraph-properties style:text-autospace="none"/>
      <style:text-properties style:font-name="Liberation Serif" fo:font-size="16pt" style:font-name-asian="Liberation Serif" style:font-size-asian="16pt" style:font-name-complex="Liberation Serif" style:font-size-complex="16pt"/>
    </style:style>
    <style:style style:name="P13" style:family="paragraph">
      <style:paragraph-properties fo:margin-top="0.42cm" fo:margin-bottom="0.35cm" fo:text-align="center"/>
      <style:text-properties fo:font-size="30pt" fo:font-weight="bold" style:font-size-asian="30pt" style:font-weight-asian="bold" style:font-size-complex="30pt" style:font-weight-complex="bold"/>
    </style:style>
    <style:style style:name="P14" style:family="paragraph">
      <style:text-properties fo:font-size="30pt" fo:font-weight="bold" style:font-size-asian="30pt" style:font-weight-asian="bold" style:font-size-complex="30pt" style:font-weight-complex="bold"/>
    </style:style>
    <style:style style:name="P15" style:family="paragraph">
      <style:paragraph-properties fo:text-align="center" style:text-autospace="none"/>
      <style:text-properties fo:color="#3465a4" loext:opacity="100%" style:font-name="Liberation Serif" fo:font-weight="bold" style:font-name-asian="Liberation Serif" style:font-weight-asian="bold" style:font-name-complex="Liberation Serif" style:font-weight-complex="bold"/>
    </style:style>
    <style:style style:name="P16" style:family="paragraph">
      <style:paragraph-properties style:text-autospace="none"/>
      <style:text-properties style:font-name="Liberation Serif" style:font-name-asian="Liberation Serif" style:font-name-complex="Liberation Serif"/>
    </style:style>
    <style:style style:name="P17" style:family="paragraph">
      <style:paragraph-properties fo:margin-top="0.42cm" fo:margin-bottom="0.35cm" fo:text-align="center"/>
    </style:style>
    <style:style style:name="P18" style:family="paragraph">
      <style:paragraph-properties fo:text-align="left"/>
    </style:style>
    <style:style style:name="P19" style:family="paragraph">
      <style:paragraph-properties fo:text-align="center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0" style:family="paragraph">
      <loext:graphic-properties draw:fill="none"/>
      <style:paragraph-properties fo:text-align="center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loext:graphic-properties draw:fill="none"/>
      <style:text-properties fo:font-size="14pt" style:font-size-asian="14pt" style:font-size-complex="14pt"/>
    </style:style>
    <style:style style:name="P23" style:family="paragraph">
      <style:paragraph-properties fo:text-align="center" style:text-autospace="none"/>
      <style:text-properties style:font-name="Liberation Serif" fo:font-size="18pt" fo:font-weight="bold" style:font-name-asian="Liberation Serif" style:font-weight-asian="bold" style:font-name-complex="Liberation Serif" style:font-weight-complex="bold"/>
    </style:style>
    <style:style style:name="P24" style:family="paragraph">
      <style:paragraph-properties style:text-autospace="none"/>
      <style:text-properties style:font-name="Liberation Serif" fo:font-size="18pt" fo:font-weight="bold" style:font-name-asian="Liberation Serif" style:font-weight-asian="bold" style:font-name-complex="Liberation Serif" style:font-weight-complex="bold"/>
    </style:style>
    <style:style style:name="P25" style:family="paragraph">
      <style:paragraph-properties style:text-autospace="none"/>
      <style:text-properties style:font-name="Liberation Serif" fo:font-size="18pt" style:font-name-asian="Liberation Serif" style:font-name-complex="Liberation Serif"/>
    </style:style>
    <style:style style:name="P26" style:family="paragraph">
      <style:paragraph-properties fo:text-align="center" style:text-autospace="none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weight="bold" fo:background-color="#ffff6d" style:font-size-asian="20pt" style:font-weight-asian="bold" style:font-size-complex="20pt" style:font-weight-complex="bold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2.629cm" svg:x="1.471cm" svg:y="3.81cm" presentation:class="title" presentation:user-transformed="true">
          <draw:text-box>
            <text:p text:style-name="P1"><text:span text:style-name="T1">Valgrind</text:span></text:p>
          </draw:text-box>
        </draw:frame>
        <draw:frame draw:style-name="gr1" draw:text-style-name="P4" draw:layer="layout" svg:width="16.581cm" svg:height="2.319cm" svg:x="5.731cm" svg:y="7.16cm">
          <draw:text-box>
            <text:p text:style-name="P2"><text:span text:style-name="T2">Dynamic Analysis Tool for Detecting Memory, Resource, and Performance Issues in C/C++ Applications</text:span></text:p>
            <text:p text:style-name="P3"/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.912cm" svg:x="1.4cm" svg:y="0.628cm" presentation:class="title" presentation:user-transformed="true">
          <draw:text-box>
            <text:p text:style-name="P6">Valgrind</text:p>
          </draw:text-box>
        </draw:frame>
        <draw:frame presentation:style-name="pr4" draw:text-style-name="P8" draw:layer="layout" svg:width="25.199cm" svg:height="11.43cm" svg:x="1.4cm" svg:y="3.175cm" presentation:class="outline" presentation:user-transformed="true">
          <draw:text-box>
            <text:p text:style-name="P7"><text:span text:style-name="T3">What is Valgrind? </text:span></text:p>
            <text:p text:style-name="P7"><text:span text:style-name="T4">Valgrind is a dynamic binary instrumentation framework used to detect memory, resource, threading, and performance issues in compiled programs. </text:span></text:p>
            <text:p text:style-name="P7"><text:span text:style-name="T4"/></text:p>
            <text:p text:style-name="P7"><text:span text:style-name="T3">What does it do? </text:span></text:p>
            <text:p text:style-name="P7"><text:span text:style-name="T4">It executes your program on a synthetic CPU and monitors every memory access, allocation, deallocation, and system call. </text:span></text:p>
            <text:p text:style-name="P7"><text:span text:style-name="T4"/></text:p>
            <text:p text:style-name="P7"><text:span text:style-name="T3">Why is it important?</text:span></text:p>
            <text:p text:style-name="P7"><text:span text:style-name="T4">It helps find bugs that are difficult to detect through testing, such as memory leaks, use-after-free, and uninitialized memory usage.</text:span></text:p>
            <text:p text:style-name="P7"><text:span text:style-name="T4"/></text:p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.912cm" svg:x="1.4cm" svg:y="0.628cm" presentation:class="title" presentation:user-transformed="true">
          <draw:text-box>
            <text:p text:style-name="P6">Cont..</text:p>
          </draw:text-box>
        </draw:frame>
        <draw:frame presentation:style-name="pr4" draw:text-style-name="P8" draw:layer="layout" svg:width="25.199cm" svg:height="11.43cm" svg:x="1.4cm" svg:y="3.175cm" presentation:class="outline" presentation:user-transformed="true">
          <draw:text-box>
            <text:p text:style-name="P9"><text:span text:style-name="T3">Where is it commonly used? </text:span></text:p>
            <text:p text:style-name="P9"><text:span text:style-name="T5">It is widely used in Linux development, embedded systems, system software, networking applications, databases, and server-side C/C++ projects. </text:span></text:p>
            <text:p text:style-name="P9"><text:span text:style-name="T6"/></text:p>
            <text:p text:style-name="P9"><text:span text:style-name="T3">Which languages benefit most? </text:span></text:p>
            <text:p text:style-name="P9"><text:span text:style-name="T5">It is primarily used for C, C++, and other native-code languages that directly manage memory. </text:span></text:p>
            <text:p text:style-name="P9"><text:span text:style-name="T5"/></text:p>
            <text:p text:style-name="P9"><text:span text:style-name="T3">How does it work?</text:span></text:p>
            <text:p text:style-name="P9"><text:span text:style-name="T5">It intercepts and analyzes machine instructions at runtime before they execute on the real CPU.</text:span></text:p>
            <text:p text:style-name="P9"><text:span text:style-name="T6"/>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layer="layout" svg:width="24.129cm" svg:height="11.427cm" svg:x="1.564cm" svg:y="3.1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SNo</text:p>
              </table:table-cell>
              <table:table-cell>
                <text:p text:style-name="P10">Issue</text:p>
              </table:table-cell>
              <table:table-cell>
                <text:p text:style-name="P10">Typical Valgrind Message</text:p>
              </table:table-cell>
            </table:table-row>
            <table:table-row table:style-name="ro1" table:default-cell-style-name="ce3">
              <table:table-cell table:style-name="ce2">
                <text:p text:style-name="P11">1</text:p>
              </table:table-cell>
              <table:table-cell>
                <text:p text:style-name="P12">Memory Leak</text:p>
              </table:table-cell>
              <table:table-cell>
                <text:p text:style-name="P12">definitely lost</text:p>
              </table:table-cell>
            </table:table-row>
            <table:table-row table:style-name="ro1" table:default-cell-style-name="ce3">
              <table:table-cell table:style-name="ce2">
                <text:p text:style-name="P11">2</text:p>
              </table:table-cell>
              <table:table-cell>
                <text:p text:style-name="P12">Use After Free</text:p>
              </table:table-cell>
              <table:table-cell>
                <text:p text:style-name="P12">Invalid read/write</text:p>
              </table:table-cell>
            </table:table-row>
            <table:table-row table:style-name="ro1" table:default-cell-style-name="ce3">
              <table:table-cell table:style-name="ce2">
                <text:p text:style-name="P11">3</text:p>
              </table:table-cell>
              <table:table-cell>
                <text:p text:style-name="P12">Heap Buffer Overflow</text:p>
              </table:table-cell>
              <table:table-cell>
                <text:p text:style-name="P12">Invalid write of size N</text:p>
              </table:table-cell>
            </table:table-row>
            <table:table-row table:style-name="ro1" table:default-cell-style-name="ce3">
              <table:table-cell table:style-name="ce2">
                <text:p text:style-name="P11">4</text:p>
              </table:table-cell>
              <table:table-cell>
                <text:p text:style-name="P12">Heap Buffer Underflow</text:p>
              </table:table-cell>
              <table:table-cell>
                <text:p text:style-name="P12">Invalid read/write</text:p>
              </table:table-cell>
            </table:table-row>
            <table:table-row table:style-name="ro1" table:default-cell-style-name="ce3">
              <table:table-cell table:style-name="ce2">
                <text:p text:style-name="P11">5</text:p>
              </table:table-cell>
              <table:table-cell>
                <text:p text:style-name="P12">Double Free</text:p>
              </table:table-cell>
              <table:table-cell>
                <text:p text:style-name="P12">Invalid free()</text:p>
              </table:table-cell>
            </table:table-row>
            <table:table-row table:style-name="ro1" table:default-cell-style-name="ce3">
              <table:table-cell table:style-name="ce2">
                <text:p text:style-name="P11">6</text:p>
              </table:table-cell>
              <table:table-cell>
                <text:p text:style-name="P12">Invalid Free</text:p>
              </table:table-cell>
              <table:table-cell>
                <text:p text:style-name="P12">Address is not stack'd, malloc'd or free'd</text:p>
              </table:table-cell>
            </table:table-row>
            <table:table-row table:style-name="ro2" table:default-cell-style-name="ce3">
              <table:table-cell table:style-name="ce2">
                <text:p text:style-name="P11">7</text:p>
              </table:table-cell>
              <table:table-cell>
                <text:p text:style-name="P12">Uninitialized Variable Use</text:p>
              </table:table-cell>
              <table:table-cell>
                <text:p text:style-name="P12">Conditional jump depends on uninitialised value(s)</text:p>
              </table:table-cell>
            </table:table-row>
            <table:table-row table:style-name="ro1" table:default-cell-style-name="ce3">
              <table:table-cell table:style-name="ce2">
                <text:p text:style-name="P11">8</text:p>
              </table:table-cell>
              <table:table-cell>
                <text:p text:style-name="P12">Mismatched Allocation/Deallocation</text:p>
              </table:table-cell>
              <table:table-cell>
                <text:p text:style-name="P12">Mismatched free() / delete / delete []</text:p>
              </table:table-cell>
            </table:table-row>
            <table:table-row table:style-name="ro1" table:default-cell-style-name="ce3">
              <table:table-cell table:style-name="ce2">
                <text:p text:style-name="P11">9</text:p>
              </table:table-cell>
              <table:table-cell>
                <text:p text:style-name="P12">File Descriptor Leak</text:p>
              </table:table-cell>
              <table:table-cell>
                <text:p text:style-name="P12">FILE DESCRIPTORS: N open at exit</text:p>
              </table:table-cell>
            </table:table-row>
            <table:table-row table:style-name="ro3" table:default-cell-style-name="ce3">
              <table:table-cell table:style-name="ce2">
                <text:p text:style-name="P11">10</text:p>
              </table:table-cell>
              <table:table-cell>
                <text:p text:style-name="P12">Invalid System Call Parameters</text:p>
              </table:table-cell>
              <table:table-cell>
                <text:p text:style-name="P12">Syscall param write(buf) points to unaddressable bytes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14" draw:layer="layout" svg:width="25.199cm" svg:height="1.912cm" svg:x="1.401cm" svg:y="0.628cm" presentation:class="title" presentation:user-transformed="true">
          <draw:text-box>
            <text:p text:style-name="P13"><text:span text:style-name="T7">Top 10 issue type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draw:style-name="gr3" draw:layer="layout" svg:width="23.494cm" svg:height="10.033cm" svg:x="1.875cm" svg:y="3.21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 table:default-cell-style-name="ce4">
              <table:table-cell>
                <text:p text:style-name="P15">Option</text:p>
              </table:table-cell>
              <table:table-cell>
                <text:p text:style-name="P15">Purpose</text:p>
              </table:table-cell>
            </table:table-row>
            <table:table-row table:style-name="ro4" table:default-cell-style-name="bg-none">
              <table:table-cell>
                <text:p text:style-name="P16">--leak-check=full</text:p>
              </table:table-cell>
              <table:table-cell>
                <text:p text:style-name="P16">Detailed memory leak report</text:p>
              </table:table-cell>
            </table:table-row>
            <table:table-row table:style-name="ro4" table:default-cell-style-name="bg-none">
              <table:table-cell>
                <text:p text:style-name="P16">--show-leak-kinds=all</text:p>
              </table:table-cell>
              <table:table-cell>
                <text:p text:style-name="P16">Show all leak categories</text:p>
              </table:table-cell>
            </table:table-row>
            <table:table-row table:style-name="ro4" table:default-cell-style-name="bg-none">
              <table:table-cell>
                <text:p text:style-name="P16">--track-origins=yes</text:p>
              </table:table-cell>
              <table:table-cell>
                <text:p text:style-name="P16">Find source of uninitialized values</text:p>
              </table:table-cell>
            </table:table-row>
            <table:table-row table:style-name="ro4" table:default-cell-style-name="bg-none">
              <table:table-cell>
                <text:p text:style-name="P16">--track-fds=yes</text:p>
              </table:table-cell>
              <table:table-cell>
                <text:p text:style-name="P16">Detect file descriptor leaks</text:p>
              </table:table-cell>
            </table:table-row>
            <table:table-row table:style-name="ro4" table:default-cell-style-name="bg-none">
              <table:table-cell>
                <text:p text:style-name="P16">--num-callers=N</text:p>
              </table:table-cell>
              <table:table-cell>
                <text:p text:style-name="P16">Show deeper call stack</text:p>
              </table:table-cell>
            </table:table-row>
            <table:table-row table:style-name="ro4" table:default-cell-style-name="bg-none">
              <table:table-cell>
                <text:p text:style-name="P16">--read-var-info=yes</text:p>
              </table:table-cell>
              <table:table-cell>
                <text:p text:style-name="P16">Read variable debug information</text:p>
              </table:table-cell>
            </table:table-row>
            <table:table-row table:style-name="ro4" table:default-cell-style-name="bg-none">
              <table:table-cell>
                <text:p text:style-name="P16">--error-limit=no</text:p>
              </table:table-cell>
              <table:table-cell>
                <text:p text:style-name="P16">Report all errors</text:p>
              </table:table-cell>
            </table:table-row>
            <table:table-row table:style-name="ro4" table:default-cell-style-name="bg-none">
              <table:table-cell>
                <text:p text:style-name="P16">--log-file=file.log</text:p>
              </table:table-cell>
              <table:table-cell>
                <text:p text:style-name="P16">Save output to file</text:p>
              </table:table-cell>
            </table:table-row>
            <table:table-row table:style-name="ro4" table:default-cell-style-name="bg-none">
              <table:table-cell>
                <text:p text:style-name="P16">-v</text:p>
              </table:table-cell>
              <table:table-cell>
                <text:p text:style-name="P16">Verbose mode</text:p>
              </table:table-cell>
            </table:table-row>
            <table:table-row table:style-name="ro4" table:default-cell-style-name="bg-none">
              <table:table-cell>
                <text:p text:style-name="P16">-s</text:p>
              </table:table-cell>
              <table:table-cell>
                <text:p text:style-name="P16">Show suppression statistics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5" draw:text-style-name="P18" draw:layer="layout" svg:width="25.199cm" svg:height="1.912cm" svg:x="1.27cm" svg:y="0.628cm" presentation:class="title" presentation:user-transformed="true">
          <draw:text-box>
            <text:p text:style-name="P17"><text:span text:style-name="T7">Top 10 issue typ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text-style-name="P1" draw:layer="layout" svg:width="25.199cm" svg:height="2.629cm" svg:x="1.471cm" svg:y="3.81cm" presentation:class="title" presentation:user-transformed="true">
          <draw:text-box>
            <text:p text:style-name="P1"><text:span text:style-name="T1">Helgrind</text:span></text:p>
          </draw:text-box>
        </draw:frame>
        <draw:frame draw:style-name="gr1" draw:text-style-name="P4" draw:layer="layout" svg:width="16.581cm" svg:height="3.366cm" svg:x="5.731cm" svg:y="7.16cm">
          <draw:text-box>
            <text:p text:style-name="P2"><text:span text:style-name="T2">Detects data races, deadlocks, and synchronization errors in multithreaded applications.</text:span></text:p>
            <text:p text:style-name="P3"><text:span text:style-name="T2"/></text:p>
            <text:p text:style-name="P3"/>
          </draw:text-box>
        </draw:frame>
        <draw:frame draw:style-name="gr4" draw:text-style-name="P20" draw:layer="layout" svg:width="24.13cm" svg:height="3.465cm" svg:x="1.905cm" svg:y="10.795cm">
          <draw:text-box>
            <text:p text:style-name="P19"><text:span text:style-name="T8">valgrind --tool=</text:span><text:span text:style-name="T9">helgrind</text:span><text:span text:style-name="T8"> ./app </text:span></text:p>
            <text:p text:style-name="P2"/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5" draw:text-style-name="P22" draw:layer="layout" svg:width="22.566cm" svg:height="7.362cm" svg:x="9.819cm" svg:y="9.148cm">
          <draw:text-box>
            <text:p text:style-name="P21"><text:span text:style-name="T10">==12345== Helgrind, a thread error detector</text:span></text:p>
            <text:p text:style-name="P21"><text:span text:style-name="T10">==12345== Possible data race during read of size 4 at 0x10C040 by thread #2</text:span></text:p>
            <text:p text:style-name="P21"><text:span text:style-name="T10">==12345== Locks held none</text:span></text:p>
            <text:p text:style-name="P21"><text:span text:style-name="T10">==12345== <text:s text:c="3"/>at 0x10917A: worker (race.c:10)</text:span></text:p>
            <text:p text:style-name="P21"><text:span text:style-name="T10"/></text:p>
            <text:p text:style-name="P21"><text:span text:style-name="T10">==12345== This conflicts with a previous write of size 4 by thread #1</text:span></text:p>
            <text:p text:style-name="P21"><text:span text:style-name="T10">==12345== Locks held: none</text:span></text:p>
            <text:p text:style-name="P21"><text:span text:style-name="T10">==12345== <text:s text:c="3"/>at 0x10916B: worker (race.c:10)</text:span></text:p>
            <text:p text:style-name="P21"><text:span text:style-name="T10"/></text:p>
            <text:p text:style-name="P21"><text:span text:style-name="T10">==12345== Address 0x10C040 is 0 bytes inside data symbol "counter"</text:span></text:p>
          </draw:text-box>
        </draw:frame>
        <draw:frame draw:style-name="gr6" draw:text-style-name="P6" draw:layer="layout" svg:width="13.396cm" svg:height="7.894cm" svg:x="1.652cm" svg:y="0.996cm">
          <draw:image xlink:href="Pictures/10000001000003A7000002273209F38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frame presentation:style-name="pr5" draw:text-style-name="P18" draw:layer="layout" svg:width="25.199cm" svg:height="1.912cm" svg:x="1.4cm" svg:y="0.628cm" presentation:class="title" presentation:user-transformed="true">
          <draw:text-box>
            <text:p text:style-name="P17"><text:span text:style-name="T7">Top 4 issue types</text:span></text:p>
          </draw:text-box>
        </draw:frame>
        <draw:frame draw:style-name="gr3" draw:layer="layout" svg:width="26.669cm" svg:height="10.899cm" svg:x="0.667cm" svg:y="3.768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bg-none">
              <table:table-cell>
                <text:p text:style-name="P23">Issue</text:p>
              </table:table-cell>
              <table:table-cell>
                <text:p text:style-name="P23">Description</text:p>
              </table:table-cell>
            </table:table-row>
            <table:table-row table:style-name="ro6" table:default-cell-style-name="bg-none">
              <table:table-cell>
                <text:p text:style-name="P24">Data Races</text:p>
              </table:table-cell>
              <table:table-cell>
                <text:p text:style-name="P25">Multiple threads access the same memory simultaneously without proper synchronization.</text:p>
              </table:table-cell>
            </table:table-row>
            <table:table-row table:style-name="ro6" table:default-cell-style-name="bg-none">
              <table:table-cell>
                <text:p text:style-name="P24">Lock Order Violations</text:p>
              </table:table-cell>
              <table:table-cell>
                <text:p text:style-name="P25">Threads acquire locks in different orders, potentially leading to deadlocks.</text:p>
              </table:table-cell>
            </table:table-row>
            <table:table-row table:style-name="ro6" table:default-cell-style-name="bg-none">
              <table:table-cell>
                <text:p text:style-name="P24">Invalid Mutex Operations</text:p>
              </table:table-cell>
              <table:table-cell>
                <text:p text:style-name="P25">Unlocking an unlocked mutex, locking an invalid mutex, or destroying a locked mutex.</text:p>
              </table:table-cell>
            </table:table-row>
            <table:table-row table:style-name="ro6" table:default-cell-style-name="bg-none">
              <table:table-cell>
                <text:p text:style-name="P24">Condition Variable Misuse</text:p>
              </table:table-cell>
              <table:table-cell>
                <text:p text:style-name="P25">Incorrect use of pthread_cond_wait(), pthread_cond_signal(), and related synchronization primitives.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4" draw:layer="layout" svg:width="25.199cm" svg:height="1.912cm" svg:x="1.401cm" svg:y="0.628cm" presentation:class="title" presentation:user-transformed="true">
          <draw:text-box>
            <text:p text:style-name="P13"><text:span text:style-name="T7">Top 4 Options</text:span></text:p>
          </draw:text-box>
        </draw:frame>
        <draw:frame draw:style-name="gr3" draw:layer="layout" svg:width="23.408cm" svg:height="7.389cm" svg:x="1.991cm" svg:y="3.997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5" table:default-cell-style-name="bg-none">
              <table:table-cell>
                <text:p text:style-name="P26">Option</text:p>
              </table:table-cell>
              <table:table-cell>
                <text:p text:style-name="P26">Purpose</text:p>
              </table:table-cell>
            </table:table-row>
            <table:table-row table:style-name="ro6" table:default-cell-style-name="bg-none">
              <table:table-cell>
                <text:p text:style-name="P16">--history-level=full</text:p>
              </table:table-cell>
              <table:table-cell>
                <text:p text:style-name="P16">Provides complete stack traces and detailed race-condition history.</text:p>
              </table:table-cell>
            </table:table-row>
            <table:table-row table:style-name="ro6" table:default-cell-style-name="bg-none">
              <table:table-cell>
                <text:p text:style-name="P16">--history-level=approx</text:p>
              </table:table-cell>
              <table:table-cell>
                <text:p text:style-name="P16">Faster analysis with reduced historical information.</text:p>
              </table:table-cell>
            </table:table-row>
            <table:table-row table:style-name="ro6" table:default-cell-style-name="bg-none">
              <table:table-cell>
                <text:p text:style-name="P16">--log-file=helgrind.log</text:p>
              </table:table-cell>
              <table:table-cell>
                <text:p text:style-name="P16">Saves Helgrind output to a file instead of the terminal.</text:p>
              </table:table-cell>
            </table:table-row>
            <table:table-row table:style-name="ro6" table:default-cell-style-name="bg-none">
              <table:table-cell>
                <text:p text:style-name="P16">-v (--verbose)</text:p>
              </table:table-cell>
              <table:table-cell>
                <text:p text:style-name="P16">Displays additional diagnostic and synchronization information.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06:37:57.822099746</meta:creation-date>
    <meta:editing-duration>PT42M47S</meta:editing-duration>
    <meta:editing-cycles>12</meta:editing-cycles>
    <meta:generator>LibreOffice/26.2.3.2$Linux_X86_64 LibreOffice_project/620$Build-2</meta:generator>
    <dc:date>2026-06-09T07:31:07.784121505</dc:date>
    <meta:document-statistic meta:object-count="58"/>
  </office:meta>
</office:document-meta>
</file>