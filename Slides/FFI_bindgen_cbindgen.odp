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D000002B56E560B9B.png" manifest:media-type="image/png"/>
  <manifest:file-entry manifest:full-path="Pictures/10000001000001A0000000FB426254B8.png" manifest:media-type="image/png"/>
  <manifest:file-entry manifest:full-path="Pictures/1000000100000265000004032EF4C2B0.png" manifest:media-type="image/png"/>
  <manifest:file-entry manifest:full-path="Pictures/1000000000000600000004009230D1F0.png" manifest:media-type="image/png"/>
  <manifest:file-entry manifest:full-path="Pictures/10000001000001E00000012F714FD5B0.png" manifest:media-type="image/png"/>
  <manifest:file-entry manifest:full-path="Pictures/10000001000004070000032808AFE586.png" manifest:media-type="image/png"/>
  <manifest:file-entry manifest:full-path="Pictures/100000010000026C000001078CB58015.png" manifest:media-type="image/png"/>
  <manifest:file-entry manifest:full-path="Pictures/TablePreview1.svm" manifest:media-type=""/>
  <manifest:file-entry manifest:full-path="Pictures/1000000000000773000004ABF663C3EF.png" manifest:media-type="image/png"/>
  <manifest:file-entry manifest:full-path="Pictures/100000010000063B0000038CC16E98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1.954cm" fo:min-width="4.084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d8ce" draw:textarea-horizontal-align="justify" draw:textarea-vertical-align="middle" draw:auto-grow-height="false" fo:min-height="11.954cm" fo:min-width="4.084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8.946cm" loext:decorative="false"/>
    </style:style>
    <style:style style:name="gr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 loext:decorative="false"/>
      <style:paragraph-properties style:writing-mode="lr-tb"/>
    </style:style>
    <style:style style:name="co1" style:family="table-column">
      <style:table-column-properties style:column-width="7.196cm" style:use-optimal-column-width="false"/>
    </style:style>
    <style:style style:name="ro1" style:family="table-row">
      <style:table-row-properties style:row-height="1.121cm" style:use-optimal-row-height="false"/>
    </style:style>
    <style:style style:name="ro2" style:family="table-row">
      <style:table-row-properties style:row-height="1.161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left" fo:text-indent="0cm" fo:border="0.48pt solid #6b7280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color="#3465a4" loext:opacity="100%" fo:font-weight="bold" style:font-weight-asian="bold" style:font-weight-complex="bold" fo:hyphenate="false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6b7280" style:font-independent-line-spacing="tru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background-color="#1c1c1c"/>
    </style:style>
    <style:style style:name="P3" style:family="paragraph">
      <style:text-properties fo:color="#ffff00" loext:opacity="100%" fo:font-size="66pt" fo:font-weight="bold" fo:background-color="#1c1c1c" style:font-size-asian="66pt" style:font-weight-asian="bold" style:font-size-complex="6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left"/>
    </style:style>
    <style:style style:name="P6" style:family="paragraph">
      <style:text-properties fo:color="#ff0000" loext:opacity="100%" fo:font-size="30pt" fo:font-weight="bold" style:font-size-asian="30pt" style:font-weight-asian="bold" style:font-size-complex="30pt" style:font-weight-complex="bold"/>
    </style:style>
    <style:style style:name="P7" style:family="paragraph">
      <style:paragraph-properties fo:margin-top="0.42cm" fo:margin-bottom="0.35cm" fo:text-align="left" style:writing-mode="lr-tb"/>
      <style:text-properties fo:font-size="10pt" style:font-size-asian="10pt" style:font-size-complex="10pt"/>
    </style:style>
    <style:style style:name="P8" style:family="paragraph">
      <style:paragraph-properties fo:text-align="left"/>
      <style:text-properties fo:color="#cccccc" loext:opacity="100%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top="0.42cm" fo:margin-bottom="0.35cm" fo:text-align="left"/>
      <style:text-properties fo:font-size="30pt" style:font-size-asian="30pt" style:font-size-complex="30pt"/>
    </style:style>
    <style:style style:name="P10" style:family="paragraph">
      <style:paragraph-properties fo:text-align="left" style:writing-mode="lr-tb"/>
    </style:style>
    <style:style style:name="P11" style:family="paragraph">
      <style:paragraph-properties fo:text-align="left"/>
    </style:style>
    <style:style style:name="P12" style:family="paragraph">
      <style:paragraph-properties fo:margin-top="0.42cm" fo:margin-bottom="0.35cm" fo:text-align="left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3465a4" loext:opacity="100%" fo:font-weight="bold" style:font-weight-asian="bold" style:font-weight-complex="bold" fo:hyphenate="false"/>
    </style:style>
    <style:style style:name="P15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.5cm" fo:margin-bottom="0cm" fo:text-align="left"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d8ce"/>
      <style:paragraph-properties fo:text-align="center" style:writing-mode="lr-tb"/>
    </style:style>
    <style:style style:name="T1" style:family="text">
      <style:text-properties fo:color="#ffff00" loext:opacity="100%" fo:font-size="66pt" fo:font-weight="bold" fo:background-color="#1c1c1c" style:font-size-asian="66pt" style:font-weight-asian="bold" style:font-size-complex="66pt" style:font-weight-complex="bold"/>
    </style:style>
    <style:style style:name="T2" style:family="text">
      <style:text-properties fo:color="#ffff00" loext:opacity="100%" fo:font-size="40pt" fo:font-weight="bold" fo:background-color="#1c1c1c" style:font-size-asian="40pt" style:font-weight-asian="bold" style:font-size-complex="40pt" style:font-weight-complex="bold"/>
    </style:style>
    <style:style style:name="T3" style:family="text">
      <style:text-properties fo:color="#ff0000" loext:opacity="100%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ccccc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3465a4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loext:opacity="100%"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3465a4" loext:opacity="100%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color="#dddddd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00" loext:opacity="100%" fo:font-size="24pt" fo:font-weight="normal" fo:background-color="#ffff00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665cm" svg:height="15.749cm" svg:x="0.247cm" svg:y="0.062cm">
          <draw:image xlink:href="Pictures/100000010000063B0000038CC16E9810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4.18cm" svg:x="1.471cm" svg:y="1.27cm" presentation:class="title" presentation:user-transformed="true">
          <draw:text-box>
            <text:p text:style-name="P2"><text:span text:style-name="T1">FFI </text:span><text:span text:style-name="T1"><text:line-break/></text:span><text:span text:style-name="T2">(Foreign Function Interfac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3">Rust Rust enthusiasts often oversell migration benefits :-)</text:span></text:p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7"><text:span text:style-name="T4">Extern "C"</text:span></text:p>
              </text:list-item>
              <text:list-item>
                <text:p text:style-name="P7"><text:span text:style-name="T5">Bindgen</text:span></text:p>
              </text:list-item>
              <text:list-item>
                <text:p text:style-name="P7"><text:span text:style-name="T5">Cbindge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6">Rust Rust enthusiasts often oversell migration benefits :-)</text:span></text:p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6">Tight Deadlines, Rapid Prototyping, or Fast Time-to-Market</text:span></text:p>
                <text:p text:style-name="P5"><text:span text:style-name="T7">- If shipping fast matters more than long-term safety, stick with what you have or choose something more dynamic.</text:span></text:p>
                <text:p text:style-name="P5"><text:span text:style-name="T6"/></text:p>
              </text:list-item>
              <text:list-item>
                <text:p text:style-name="P5"><text:span text:style-name="T6">Large, Stable Legacy Codebases</text:span></text:p>
                <text:list>
                  <text:list-item>
                    <text:p text:style-name="P5"><text:span text:style-name="T7">Rust adoption is slow or impractical due to toolchain maturity, standards, and team expertise.</text:span></text:p>
                    <text:p text:style-name="P5"><text:span text:style-name="T7"/></text:p>
                  </text:list-item>
                </text:list>
              </text:list-item>
            </text:list>
            <text:p text:style-name="P5"><text:span text:style-name="T7"/></text:p>
            <text:list text:continue-numbering="true" text:style-name="L2">
              <text:list-item>
                <text:p text:style-name="P5"><text:span text:style-name="T6">Projects Where Memory Safety and Performance Aren't Critical</text:span></text:p>
                <text:list>
                  <text:list-item>
                    <text:p text:style-name="P11"><text:span text:style-name="T6">Python, Java, Go, or TypeScript suffice and are faster to develop.</text:span></text:p>
                    <text:p text:style-name="P5"><text:span text:style-name="T6"/></text:p>
                  </text:list-item>
                </text:list>
              </text:list-item>
              <text:list-item>
                <text:p text:style-name="P5"><text:span text:style-name="T6">Limited Team Expertise or Hiring Constraints</text:span></text:p>
                <text:p text:style-name="P5"><text:span text:style-name="T6"/></text:p>
              </text:list-item>
              <text:list-item>
                <text:p text:style-name="P5"><text:span text:style-name="T6">When Stability, Maturity, or "Battle-Tested" Matters Most</text:span></text:p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6">Tight Deadlines, Rapid Prototyping, or Fast Time-to-Market</text:span></text:p>
                <text:p text:style-name="P5"><text:span text:style-name="T7">- If shipping fast matters more than long-term safety, stick with what you have or choose something more dynamic.</text:span></text:p>
                <text:p text:style-name="P5"><text:span text:style-name="T6"/></text:p>
              </text:list-item>
              <text:list-item>
                <text:p text:style-name="P5"><text:span text:style-name="T6">Large, Stable Legacy Codebases</text:span></text:p>
                <text:list>
                  <text:list-item>
                    <text:p text:style-name="P5"><text:span text:style-name="T7">Rust adoption is slow or impractical due to toolchain maturity, standards, and team expertise.</text:span></text:p>
                    <text:p text:style-name="P5"><text:span text:style-name="T7"/></text:p>
                  </text:list-item>
                </text:list>
              </text:list-item>
            </text:list>
            <text:p text:style-name="P5"><text:span text:style-name="T7"/></text:p>
            <text:list text:continue-numbering="true" text:style-name="L2">
              <text:list-item>
                <text:p text:style-name="P5"><text:span text:style-name="T6">Projects Where Memory Safety and Performance Aren't Critical</text:span></text:p>
                <text:list>
                  <text:list-item>
                    <text:p text:style-name="P11"><text:span text:style-name="T6">Python, Java, Go, or TypeScript suffice and are faster to develop.</text:span></text:p>
                    <text:p text:style-name="P5"><text:span text:style-name="T6"/></text:p>
                  </text:list-item>
                </text:list>
              </text:list-item>
              <text:list-item>
                <text:p text:style-name="P5"><text:span text:style-name="T6">Limited Team Expertise or Hiring Constraints</text:span></text:p>
                <text:p text:style-name="P5"><text:span text:style-name="T6"/></text:p>
              </text:list-item>
              <text:list-item>
                <text:p text:style-name="P5"><text:span text:style-name="T6">When Stability, Maturity, or "Battle-Tested" Matters Most</text:span></text:p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header>
                <text:p text:style-name="P5"><text:span text:style-name="T8">When Should You Rewrite in Rust?</text:span></text:p>
              </text:list-header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8">Memory Safety</text:span></text:p>
                <text:list>
                  <text:list-item>
                    <text:p text:style-name="P11"><text:span text:style-name="T9">Legacy C/C++ programs might suffer from memory-related bugs. Rust removes this class of bugs entirely.</text:span></text:p>
                    <text:p text:style-name="P11"><text:span text:style-name="T9"/></text:p>
                  </text:list-item>
                  <text:list-item>
                    <text:p text:style-name="P11"><text:span text:style-name="T10">For: Medical, accounting, security software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8">Performance</text:span></text:p>
                <text:list>
                  <text:list-item>
                    <text:p text:style-name="P11"><text:span text:style-name="T11">If raw </text:span><text:span text:style-name="T12">speed</text:span><text:span text:style-name="T11"> optimization is your priority and your existing stack cannot perform without sacrificing security, Rust provides C-level performance without the penalty of garbage collection.</text:span></text:p>
                    <text:p text:style-name="P11"><text:span text:style-name="T11"/></text:p>
                  </text:list-item>
                  <text:list-item>
                    <text:p text:style-name="P5"><text:span text:style-name="T10">For: Data Engines, streaming services, games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13">Low-Level Systems</text:span></text:p>
                <text:list>
                  <text:list-item>
                    <text:p text:style-name="P11"><text:span text:style-name="T14">Rust is well-suited for kernel modules, embedded systems, and device drivers. It offers total control without using unsafe code.</text:span></text:p>
                    <text:p text:style-name="P11"><text:span text:style-name="T10"/></text:p>
                  </text:list-item>
                  <text:list-item>
                    <text:p text:style-name="P11"><text:span text:style-name="T10">Works for: Embedded devices, custom operating systems</text:span></text:p>
                  </text:list-item>
                </text:list>
                <text:p text:style-name="P5"><text:span text:style-name="T15"/></text:p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16">Multithreading</text:span></text:p>
                <text:list>
                  <text:list-item>
                    <text:p text:style-name="P11"><text:span text:style-name="T14">Rust’s ownership model makes concurrent programming safer and easier to reason about.</text:span></text:p>
                    <text:p text:style-name="P11"><text:span text:style-name="T14"/></text:p>
                  </text:list-item>
                  <text:list-item>
                    <text:p text:style-name="P11"><text:span text:style-name="T10">Works for: High-traffic APIs, real-time analytics systems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2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5"><text:span text:style-name="T16">Outdated or Unsupported Technological Stack</text:span></text:p>
                <text:list>
                  <text:list-item>
                    <text:p text:style-name="P11"><text:span text:style-name="T14">If your codebase is in a language that is no longer supported or sustainable, rewriting it in Rust promises a contemporary foundation.</text:span></text:p>
                    <text:p text:style-name="P11"><text:span text:style-name="T14"/></text:p>
                  </text:list-item>
                  <text:list-item>
                    <text:p text:style-name="P11"><text:span text:style-name="T10">Works for: Migration from legacy C/C++, Perl, or old PHP apps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4">When NOT to migrate <text:s/></text:span></text:p>
              </text:list-item>
              <text:list-item>
                <text:p text:style-name="P10"><text:span text:style-name="T5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header>
                <text:p text:style-name="P13"><text:span text:style-name="T17">Bottom line: Don't boil the ocean.</text:span></text:p>
              </text:list-header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18">When NOT to migrate <text:s/></text:span></text:p>
              </text:list-item>
              <text:list-item>
                <text:p text:style-name="P10"><text:span text:style-name="T4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9" draw:layer="layout" svg:width="22.225cm" svg:height="13.335cm" svg:x="5.08cm" svg:y="1.27cm" presentation:class="outline" presentation:placeholder="true" presentation:user-transformed="true">
          <draw:text-box/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0"><text:span text:style-name="T18">When NOT to migrate <text:s/></text:span></text:p>
              </text:list-item>
              <text:list-item>
                <text:p text:style-name="P10"><text:span text:style-name="T4">Incremental vs full rewrite</text:span></text:p>
              </text:list-item>
              <text:list-item>
                <text:p text:style-name="P10"><text:span text:style-name="T5">Risk management <text:s/>• </text:span></text:p>
              </text:list-item>
              <text:list-item>
                <text:p text:style-name="P10"><text:span text:style-name="T5">Migration techniques from legacy C++ to C++23 </text:span></text:p>
              </text:list-item>
            </text:list>
          </draw:text-box>
        </draw:frame>
        <draw:frame draw:name="Table 0" draw:style-name="gr3" draw:layer="layout" svg:width="21.587cm" svg:height="8.086cm" svg:x="5.701cm" svg:y="4.014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4"><text:span text:style-name="T19">Aspect</text:span></text:p>
              </table:table-cell>
              <table:table-cell>
                <text:p text:style-name="P14"><text:span text:style-name="T19">Full Rewrite</text:span></text:p>
              </table:table-cell>
              <table:table-cell>
                <text:p text:style-name="P14"><text:span text:style-name="T19">Incremental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0">Risk</text:span></text:p>
              </table:table-cell>
              <table:table-cell>
                <text:p text:style-name="P15"><text:span text:style-name="T20">High</text:span></text:p>
              </table:table-cell>
              <table:table-cell>
                <text:p text:style-name="P15"><text:span text:style-name="T20">Low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0">Time to Value</text:span></text:p>
              </table:table-cell>
              <table:table-cell>
                <text:p text:style-name="P15"><text:span text:style-name="T20">Late</text:span></text:p>
              </table:table-cell>
              <table:table-cell>
                <text:p text:style-name="P15"><text:span text:style-name="T20">Early &amp; Continuous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0">Cost</text:span></text:p>
              </table:table-cell>
              <table:table-cell>
                <text:p text:style-name="P15"><text:span text:style-name="T20">Very High Upfront</text:span></text:p>
              </table:table-cell>
              <table:table-cell>
                <text:p text:style-name="P15"><text:span text:style-name="T20">Spread Out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0">Team Impact</text:span></text:p>
              </table:table-cell>
              <table:table-cell>
                <text:p text:style-name="P15"><text:span text:style-name="T20">Big Disruption</text:span></text:p>
              </table:table-cell>
              <table:table-cell>
                <text:p text:style-name="P15"><text:span text:style-name="T20">Gradual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0">Success Rate</text:span></text:p>
              </table:table-cell>
              <table:table-cell>
                <text:p text:style-name="P15"><text:span text:style-name="T20">Lower</text:span></text:p>
              </table:table-cell>
              <table:table-cell>
                <text:p text:style-name="P15"><text:span text:style-name="T20">Higher (in practice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0">Maintenance</text:span></text:p>
              </table:table-cell>
              <table:table-cell>
                <text:p text:style-name="P15"><text:span text:style-name="T20">Parallel Systems</text:span></text:p>
              </table:table-cell>
              <table:table-cell>
                <text:p text:style-name="P15"><text:span text:style-name="T20">Hybrid during transi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header>
                <text:p text:style-name="P5"><text:span text:style-name="T8">When Should You Rewrite in Rust?</text:span></text:p>
              </text:list-header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9" draw:layer="layout" svg:width="22.225cm" svg:height="13.335cm" svg:x="5.08cm" svg:y="1.27cm" presentation:class="outline" presentation:user-transformed="true">
          <draw:text-box>
            <text:list text:style-name="L2">
              <text:list-header>
                <text:p text:style-name="P5"><text:span text:style-name="T8">Sample Project (V2X)</text:span></text:p>
              </text:list-header>
            </text:list>
          </draw:text-box>
        </draw:frame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draw:style-name="gr1" draw:text-style-name="P1" draw:layer="layout" svg:width="19.05cm" svg:height="11.938cm" svg:x="6.985cm" svg:y="1.905cm">
          <draw:image xlink:href="Pictures/1000000000000773000004ABF663C3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draw:style-name="gr1" draw:text-style-name="P1" draw:layer="layout" svg:width="16.315cm" svg:height="12.786cm" svg:x="9.525cm" svg:y="1.27cm">
          <draw:image xlink:href="Pictures/10000001000004070000032808AFE5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draw:style-name="gr1" draw:text-style-name="P1" draw:layer="layout" svg:width="20.32cm" svg:height="13.546cm" svg:x="5.715cm" svg:y="1.27cm">
          <draw:image xlink:href="Pictures/1000000000000600000004009230D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custom-shape draw:style-name="gr4" draw:text-style-name="P18" draw:layer="layout" svg:width="5.08cm" svg:height="12.7cm" svg:x="5.715cm" svg:y="1.905cm">
          <text:p text:style-name="P17">Network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" draw:text-style-name="P1" draw:layer="layout" svg:width="7.82cm" svg:height="4.936cm" svg:x="11.865cm" svg:y="8.399cm">
          <draw:image xlink:href="Pictures/10000001000001E00000012F714FD5B0.png" xlink:type="simple" xlink:show="embed" xlink:actuate="onLoad" draw:mime-type="image/png">
            <text:p/>
          </draw:image>
        </draw:frame>
        <draw:custom-shape draw:style-name="gr5" draw:text-style-name="P19" draw:layer="layout" svg:width="5.08cm" svg:height="12.7cm" svg:x="21.59cm" svg:y="1.905cm">
          <text:p text:style-name="P17">Network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7" draw:layer="layout" svg:width="10.795cm" svg:height="3.175cm" svg:x="10.795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draw:style-name="gr1" draw:text-style-name="P1" draw:layer="layout" svg:width="7.906cm" svg:height="13.248cm" svg:x="17.145cm" svg:y="1.27cm">
          <draw:image xlink:href="Pictures/1000000100000265000004032EF4C2B0.png" xlink:type="simple" xlink:show="embed" xlink:actuate="onLoad" draw:mime-type="image/png">
            <text:p/>
          </draw:image>
        </draw:frame>
        <draw:frame draw:style-name="gr1" draw:text-style-name="P1" draw:layer="layout" svg:width="8.086cm" svg:height="3.43cm" svg:x="7.154cm" svg:y="7.365cm">
          <draw:image xlink:href="Pictures/100000010000026C000001078CB58015.png" xlink:type="simple" xlink:show="embed" xlink:actuate="onLoad" draw:mime-type="image/png">
            <text:p/>
          </draw:image>
        </draw:frame>
        <draw:line draw:style-name="gr7" draw:text-style-name="P1" draw:layer="layout" svg:x1="15.24cm" svg:y1="8.89cm" svg:x2="18.466cm" svg:y2="8.89cm">
          <text:p/>
        </draw:lin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draw:style-name="gr1" draw:text-style-name="P1" draw:layer="layout" svg:width="7.292cm" svg:height="4.399cm" svg:x="6.678cm" svg:y="3.221cm">
          <draw:image xlink:href="Pictures/10000001000001A0000000FB426254B8.png" xlink:type="simple" xlink:show="embed" xlink:actuate="onLoad" draw:mime-type="image/png">
            <text:p/>
          </draw:image>
        </draw:frame>
        <draw:frame draw:style-name="gr1" draw:text-style-name="P1" draw:layer="layout" svg:width="11.846cm" svg:height="8.724cm" svg:x="15.875cm" svg:y="4.611cm">
          <draw:image xlink:href="Pictures/10000001000003AD000002B56E560B9B.png" xlink:type="simple" xlink:show="embed" xlink:actuate="onLoad" draw:mime-type="image/png">
            <text:p/>
          </draw:image>
        </draw:frame>
        <draw:line draw:style-name="gr7" draw:text-style-name="P1" draw:layer="layout" svg:x1="13.97cm" svg:y1="5.08cm" svg:x2="15.875cm" svg:y2="5.08cm">
          <text:p/>
        </draw:lin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presentation:style-name="pr4" draw:text-style-name="P12" draw:layer="layout" svg:width="22.225cm" svg:height="13.335cm" svg:x="5.081cm" svg:y="1.271cm" presentation:class="outline" presentation:user-transformed="true">
          <draw:text-box>
            <text:list text:style-name="L2">
              <text:list-item>
                <text:p text:style-name="P5"><text:span text:style-name="T16">Memory Management:</text:span></text:p>
                <text:list>
                  <text:list-item>
                    <text:p text:style-name="P11"><text:span text:style-name="T14">Who Allocates vs. Who Frees: You must establish a strict rule: If C allocates the memory, C must free it. If Rust allocates it, Rust must free it.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presentation:style-name="pr4" draw:text-style-name="P12" draw:layer="layout" svg:width="22.225cm" svg:height="13.335cm" svg:x="5.081cm" svg:y="1.271cm" presentation:class="outline" presentation:user-transformed="true">
          <draw:text-box>
            <text:list text:style-name="L2">
              <text:list-item>
                <text:p text:style-name="P5"><text:span text:style-name="T16">Memory Management:</text:span></text:p>
                <text:list>
                  <text:list-item>
                    <text:p text:style-name="P11"><text:span text:style-name="T14">Who Allocates vs. Who Frees: You must establish a strict rule: If C allocates the memory, C must free it. If Rust allocates it, Rust must free it. </text:span></text:p>
                  </text:list-item>
                  <text:list-item>
                    <text:p text:style-name="P11"><text:span text:style-name="T14">Null Pointers: C functions can return NULL. Rust references (like &amp;T) can never be null. If a C function might return a null pointer, you must use *const T or *mut T in Rust and check for null using .is_null() before dereferencing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presentation:style-name="pr4" draw:text-style-name="P12" draw:layer="layout" svg:width="22.225cm" svg:height="13.335cm" svg:x="5.081cm" svg:y="1.271cm" presentation:class="outline" presentation:user-transformed="true">
          <draw:text-box>
            <text:list text:style-name="L2">
              <text:list-item>
                <text:p text:style-name="P5"><text:span text:style-name="T16">Data Layout &amp; Struct Padding</text:span></text:p>
                <text:list>
                  <text:list-item>
                    <text:p text:style-name="P11"><text:span text:style-name="T14">#[repr(C)] is Mandatory: Any struct defined in Rust that will be passed to C must have the #[repr(C)] attribute </text:span></text:p>
                  </text:list-item>
                  <text:list-item>
                    <text:p text:style-name="P11"><text:span text:style-name="T21">Structs over the Network (IPC) : </text:span><text:span text:style-name="T22">Danger</text:span></text:p>
                    <text:p text:style-name="P11"><text:span text:style-name="T21">(Use protoco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presentation:style-name="pr4" draw:text-style-name="P12" draw:layer="layout" svg:width="22.225cm" svg:height="13.335cm" svg:x="5.081cm" svg:y="1.271cm" presentation:class="outline" presentation:user-transformed="true">
          <draw:text-box>
            <text:list text:style-name="L2">
              <text:list-item>
                <text:p text:style-name="P5"><text:span text:style-name="T16">Encapsulating unsafe Code</text:span></text:p>
                <text:list>
                  <text:list-item>
                    <text:p text:style-name="P11"><text:span text:style-name="T14">Every time you call a C function from Rust, you must wrap it in an </text:span><text:span text:style-name="T23">unsafe {}</text:span><text:span text:style-name="T14"> block.</text:span></text:p>
                  </text:list-item>
                  <text:list-item>
                    <text:p text:style-name="P11"><text:span text:style-name="T21">Minimize unsafe Blocks:</text:span><text:span text:style-name="T14"> Keep your unsafe blocks as small as possible.</text:span></text:p>
                  </text:list-item>
                  <text:list-item>
                    <text:p text:style-name="P11"><text:span text:style-name="T21">Create Safe Wrappers: </text:span><text:span text:style-name="T14">Best practice dictates that you shouldn't scatter unsafe FFI calls throughout your application logi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presentation:style-name="pr4" draw:text-style-name="P12" draw:layer="layout" svg:width="22.225cm" svg:height="13.335cm" svg:x="5.081cm" svg:y="1.271cm" presentation:class="outline" presentation:user-transformed="true">
          <draw:text-box>
            <text:list text:style-name="L2">
              <text:list-item>
                <text:p text:style-name="P5"><text:span text:style-name="T16">Build Systems and Linking</text:span></text:p>
                <text:list>
                  <text:list-item>
                    <text:p text:style-name="P11"><text:span text:style-name="T14">Rust uses Cargo, while C typically uses Make/CMake. You have to bridge the build tools.</text:span></text:p>
                    <text:list>
                      <text:list-item>
                        <text:p text:style-name="P11"><text:span text:style-name="T14">The </text:span><text:span text:style-name="T23">build.rs </text:span><text:span text:style-name="T14">File: You must use a build script in Rust (build.rs) to tell Cargo where to find the C library (cargo:rustc-link-search) and what library to link (cargo:rustc-link-lib).</text:span></text:p>
                      </text:list-item>
                      <text:list-item>
                        <text:p text:style-name="P11"><text:span text:style-name="T21">Dynamic vs. Static Linking:</text:span></text:p>
                        <text:list>
                          <text:list-item>
                            <text:p text:style-name="P11"><text:span text:style-name="T14">Whe we use Dynamic Library (libasn1.so),  .so file must be present on the target machine at runtime, and the LD_LIBRARY_PATH must be set properly so the OS loader can find it.</text:span></text:p>
                          </text:list-item>
                          <text:list-item>
                            <text:p text:style-name="P11"><text:span text:style-name="T14">Alternative: You can compile the C code as a Static Library (libasn1.a). This embeds the C code directly into your Rust binary, resulting in a single executable that is much easier to deploy.</text:span></text:p>
                          </text:list-item>
                        </text:list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16"><text:span text:style-name="T18">When NOT to migrate <text:s/></text:span></text:p>
              </text:list-item>
              <text:list-item>
                <text:p text:style-name="P16"><text:span text:style-name="T4">Incremental vs full rewrite</text:span></text:p>
              </text:list-item>
              <text:list-item>
                <text:p text:style-name="P16"><text:span text:style-name="T5">Risk management <text:s/>• </text:span></text:p>
              </text:list-item>
              <text:list-item>
                <text:p text:style-name="P16"><text:span text:style-name="T5">Migration techniques from legacy C++ to C++23 </text:span></text:p>
              </text:list-item>
            </text:list>
          </draw:text-box>
        </draw:frame>
        <draw:frame presentation:style-name="pr4" draw:text-style-name="P12" draw:layer="layout" svg:width="22.225cm" svg:height="13.335cm" svg:x="5.081cm" svg:y="1.271cm" presentation:class="outline" presentation:user-transformed="true">
          <draw:text-box>
            <text:list text:style-name="L2">
              <text:list-item>
                <text:p text:style-name="P5"><text:span text:style-name="T16">Thread Safety</text:span></text:p>
                <text:list>
                  <text:list-item>
                    <text:p text:style-name="P11"><text:span text:style-name="T14">Rust guarantees thread safety via Send and Sync traits. C makes no such guarantees.</text:span></text:p>
                    <text:list>
                      <text:list-item>
                        <text:p text:style-name="P11"><text:span text:style-name="T14">If your C library relies on global state or static variables (which is common in legacy C code), it is not thread-safe.</text:span></text:p>
                      </text:list-item>
                      <text:list-item>
                        <text:p text:style-name="P11"><text:span text:style-name="T14">If you call a non-thread-safe C function from multiple Rust threads simultaneously (like our TCP connection threads), you will cause a race condition. If the C library isn't thread-safe, you must wrap the FFI calls in a Rust Mutex.</text:span></text:p>
                      </text:list-item>
                    </text:list>
                  </text:list-item>
                  <text:list-item>
                    <text:p text:style-name="P11"><text:span text:style-name="T14"/></text:p>
                    <text:list>
                      <text:list-header>
                        <text:p text:style-name="P11"><text:span text:style-name="T1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22:35:40.649936356</meta:creation-date>
    <dc:date>2026-06-10T23:04:41.095888699</dc:date>
    <meta:editing-duration>PT21H38M53S</meta:editing-duration>
    <meta:editing-cycles>32</meta:editing-cycles>
    <meta:generator>LibreOffice/26.2.3.2$Linux_X86_64 LibreOffice_project/620$Build-2</meta:generator>
    <meta:document-statistic meta:object-count="137"/>
  </office:meta>
</office:document-meta>
</file>